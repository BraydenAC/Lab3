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097in" style:rel-column-width="2030*"/>
    </style:style>
    <style:style style:name="Table1.B" style:family="table-column">
      <style:table-column-properties style:column-width="0.8979in" style:rel-column-width="1293*"/>
    </style:style>
    <style:style style:name="Table1.C" style:family="table-column">
      <style:table-column-properties style:column-width="1.1542in" style:rel-column-width="1662*"/>
    </style:style>
    <style:style style:name="Table1.F" style:family="table-column">
      <style:table-column-properties style:column-width="1.1549in" style:rel-column-width="16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4097in" style:rel-column-width="2030*"/>
    </style:style>
    <style:style style:name="Table2.B" style:family="table-column">
      <style:table-column-properties style:column-width="0.8979in" style:rel-column-width="1293*"/>
    </style:style>
    <style:style style:name="Table2.C" style:family="table-column">
      <style:table-column-properties style:column-width="1.1542in" style:rel-column-width="1662*"/>
    </style:style>
    <style:style style:name="Table2.F" style:family="table-column">
      <style:table-column-properties style:column-width="1.1549in" style:rel-column-width="166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fo:font-size="12pt" style:font-size-asian="10.5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fo:font-size="12pt" fo:font-weight="bold" officeooo:rsid="000a95af" officeooo:paragraph-rsid="000a95af" style:font-size-asian="10.5pt" style:font-weight-asian="bold" style:font-size-complex="12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12pt" fo:font-weight="bold" officeooo:rsid="000a95af" officeooo:paragraph-rsid="000a95af" style:font-size-asian="10.5pt" style:font-weight-asian="bold" style:font-size-complex="12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font-size="12pt" fo:font-weight="normal" officeooo:rsid="000a95af" officeooo:paragraph-rsid="000a95af" style:font-size-asian="10.5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ize="12pt" fo:font-weight="normal" officeooo:rsid="000a95af" officeooo:paragraph-rsid="000a95af" style:font-size-asian="10.5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Liberation Mono" fo:font-size="12pt" style:font-name-asian="Noto Sans Mono CJK SC" style:font-size-asian="10.5pt" style:font-name-complex="Liberation Mono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Mono" fo:font-size="12pt" officeooo:paragraph-rsid="000a95af" style:font-name-asian="Noto Sans Mono CJK SC" style:font-size-asian="10.5pt" style:font-name-complex="Liberation Mono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Mono" fo:font-size="12pt" officeooo:rsid="000a95af" officeooo:paragraph-rsid="000a95af" style:font-name-asian="Noto Sans Mono CJK SC" style:font-size-asian="10.5pt" style:font-name-complex="Liberation Mono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Mono" fo:font-size="12pt" fo:font-weight="bold" officeooo:rsid="000a95af" officeooo:paragraph-rsid="000a95af" style:font-name-asian="Noto Sans Mono CJK SC" style:font-size-asian="10.5pt" style:font-weight-asian="bold" style:font-name-complex="Liberation Mono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ab 3:Representation Learning and Multimodal Fusion</text:p>
      <text:p text:style-name="P2"/>
      <text:p text:style-name="P4">Brayden Cloutier</text:p>
      <text:p text:style-name="P4">University of Michigan</text:p>
      <text:p text:style-name="P4">ARI-510: Machine Learning</text:p>
      <text:p text:style-name="P4">[[[Date]]]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Overview</text:p>
      <text:p text:style-name="P2">__________________________________________________</text:p>
      <text:p text:style-name="P5"/>
      <text:p text:style-name="P5"/>
      <text:p text:style-name="P5"/>
      <text:p text:style-name="P4"/>
      <text:p text:style-name="P2">Results</text:p>
      <text:p text:style-name="P2">__________________________________________________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>
          <table:table-cell table:style-name="Table1.A1" office:value-type="string">
            <text:p text:style-name="P9">Dev Set</text:p>
          </table:table-cell>
          <table:table-cell table:style-name="Table1.A1" office:value-type="string">
            <text:p text:style-name="P8">Accuracy</text:p>
          </table:table-cell>
          <table:table-cell table:style-name="Table1.A1" office:value-type="string">
            <text:p text:style-name="P8">Precision</text:p>
          </table:table-cell>
          <table:table-cell table:style-name="Table1.A1" office:value-type="string">
            <text:p text:style-name="P8">Recall</text:p>
          </table:table-cell>
          <table:table-cell table:style-name="Table1.A1" office:value-type="string">
            <text:p text:style-name="P8">F1-Score</text:p>
          </table:table-cell>
          <table:table-cell table:style-name="Table1.F1" office:value-type="string">
            <text:p text:style-name="P8">AUC-ROC</text:p>
          </table:table-cell>
        </table:table-row>
        <table:table-row>
          <table:table-cell table:style-name="Table1.A2" office:value-type="string">
            <text:p text:style-name="P8">Text Only</text:p>
            <text:p text:style-name="P8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8">Image Only</text:p>
            <text:p text:style-name="P8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8">Multimodel:</text:p>
            <text:p text:style-name="P8">Early Fusion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8">Multimodel:</text:p>
            <text:p text:style-name="P8">Late Fusion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</table:table>
      <text:p text:style-name="P5"/>
      <text:p text:style-name="P2"/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row>
          <table:table-cell table:style-name="Table2.A1" office:value-type="string">
            <text:p text:style-name="P9">Test Set</text:p>
          </table:table-cell>
          <table:table-cell table:style-name="Table2.A1" office:value-type="string">
            <text:p text:style-name="P8">Accuracy</text:p>
          </table:table-cell>
          <table:table-cell table:style-name="Table2.A1" office:value-type="string">
            <text:p text:style-name="P8">Precision</text:p>
          </table:table-cell>
          <table:table-cell table:style-name="Table2.A1" office:value-type="string">
            <text:p text:style-name="P8">Recall</text:p>
          </table:table-cell>
          <table:table-cell table:style-name="Table2.A1" office:value-type="string">
            <text:p text:style-name="P8">F1-Score</text:p>
          </table:table-cell>
          <table:table-cell table:style-name="Table2.F1" office:value-type="string">
            <text:p text:style-name="P8">AUC-ROC</text:p>
          </table:table-cell>
        </table:table-row>
        <table:table-row>
          <table:table-cell table:style-name="Table2.A2" office:value-type="string">
            <text:p text:style-name="P8">Text Only</text:p>
            <text:p text:style-name="P8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F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8">Image Only</text:p>
            <text:p text:style-name="P8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F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8">Multimodel:</text:p>
            <text:p text:style-name="P8">Early Fusion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F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8">Multimodel:</text:p>
            <text:p text:style-name="P8">Late Fusion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F2" office:value-type="string">
            <text:p text:style-name="P7"/>
          </table:table-cell>
        </table:table-row>
      </table:table>
      <text:p text:style-name="P3"/>
      <text:p text:style-name="P2"/>
      <text:p text:style-name="P2">Discussion</text:p>
      <text:p text:style-name="P2">__________________________________________________</text:p>
      <text:p text:style-name="P5"/>
      <text:p text:style-name="P5"><text:span text:style-name="T1">Prompt</text:span>: what can we learn about the importance of text and</text:p>
      <text:p text:style-name="P5">image based features for the hateful memes dataset? What are the</text:p>
      <text:p text:style-name="P5">main things you learned about multimodal machine learning from</text:p>
      <text:p text:style-name="P5">doing this assignment? What challenges did you face during this</text:p>
      <text:p text:style-name="P5">assignment and how did you overcome them?</text:p>
      <text:p text:style-name="P5"/>
      <text:p text:style-name="P2">Generative AI Statement</text:p>
      <text:p text:style-name="P2">__________________________________________________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1T15:02:52.434634611</dc:date>
    <meta:editing-duration>PT17S</meta:editing-duration>
    <meta:editing-cycles>1</meta:editing-cycles>
    <meta:document-statistic meta:table-count="2" meta:image-count="0" meta:object-count="0" meta:page-count="2" meta:paragraph-count="42" meta:word-count="107" meta:character-count="879" meta:non-whitespace-character-count="814"/>
    <meta:generator>LibreOffice/24.2.6.2$Linux_X86_64 LibreOffice_project/420$Build-2</meta:generator>
  </office:meta>
</office:document-meta>
</file>